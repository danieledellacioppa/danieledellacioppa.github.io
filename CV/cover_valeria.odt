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Cantarell" fo:font-size="12pt" officeooo:rsid="0011f4db" officeooo:paragraph-rsid="0011f4db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Cantarell" fo:font-size="12pt" style:font-size-asian="12pt" style:font-size-complex="12pt"/>
    </style:style>
    <style:style style:name="P3" style:family="paragraph" style:parent-style-name="Heading_20_2">
      <style:paragraph-properties fo:text-align="justify" style:justify-single-word="false"/>
      <style:text-properties style:font-name="Cantarel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ntarel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ntarell" fo:font-size="12pt" officeooo:rsid="0012c694" officeooo:paragraph-rsid="0012c69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ntarell" fo:font-size="10pt" officeooo:rsid="0012c694" officeooo:paragraph-rsid="0012c694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 <text:s text:c="8"/><text:span text:style-name="T1">Cover Letter</text:span></text:p>
      <text:p text:style-name="P2">I believe my previous management experience lines up really well with what a Supervisor does.</text:p>
      <text:p text:style-name="P2">When you're supporting agents rather than working solely as one, you start seeing the bigger picture. You understand the challenges from a different angle and become more aware of both the limitations and opportunities within the business.</text:p>
      <text:p text:style-name="P2">Throughout my career, I've learned how to make decisions that balance excellent customer service with company policies, SOPs and legal requirements.</text:p>
      <text:p text:style-name="P2">Although I haven't been an agent for very long, I'm a quick learner, highly self-motivated and always keen to lead by example.</text:p>
      <text:h text:style-name="P3" text:outline-level="2">Supervising a Team</text:h>
      <text:p text:style-name="P2">A lot of my previous roles involved leading and supporting teams, from working as a Restaurant Manager to being an Assistant Team Leader at Whole Foods, as well as my experience as a teacher.</text:p>
      <text:p text:style-name="P2">Supporting people comes naturally to me. I enjoy creating a positive environment where everyone feels included, supported and part of the team.</text:p>
      <text:h text:style-name="P3" text:outline-level="2">Organisation, Operations and Workflow</text:h>
      <text:p text:style-name="P2">Planning the day, assigning tasks, balancing workloads and keeping processes up to date are all things I've done regularly throughout my career.</text:p>
      <text:p text:style-name="P2">As an Assistant Manager, I was responsible for managing several priorities at once. While handling tasks such as placing orders and monitoring operations, I also made sure my team had clear objectives and knew exactly what was expected of them.</text:p>
      <text:p text:style-name="P2">I've found that when everyone understands their priorities, the whole team performs better.</text:p>
      <text:h text:style-name="P3" text:outline-level="2">Managing Escalations and Complex Cases</text:h>
      <text:p text:style-name="P2">I've regularly worked as a Duty Manager, taking responsibility for the entire shop and dealing with challenging situations where good judgement and calm decision-making were essential.</text:p>
      <text:p text:style-name="P2">I'm comfortable taking ownership of complex cases, de-escalating situations and finding solutions that work for both the customer and the business.</text:p>
      <text:h text:style-name="P3" text:outline-level="2">Supporting the Market Leader</text:h>
      <text:p text:style-name="P2">Having worked as an Associate Team Leader for eight years, I understand the importance of being that second pair of eyes and stepping up when needed.</text:p>
      <text:p text:style-name="P2">A strong supervisor supports both the team and the Market Leader, helping maintain consistency and ensuring everything runs smoothly.</text:p>
      <text:h text:style-name="P3" text:outline-level="2"><text:soft-page-break/>Quality Assurance and Coaching</text:h>
      <text:p text:style-name="P2">I've conducted one-to-one reviews, monitored performance and developed systems to track daily tasks and product knowledge.</text:p>
      <text:p text:style-name="P2">Providing constructive feedback, coaching team members and leading by example have always been key parts of my approach.</text:p>
      <text:p text:style-name="P2">I understand the importance of maintaining high standards while ensuring compliance with SOPs, GDPR, consumer rights and brand values.</text:p>
      <text:h text:style-name="P3" text:outline-level="2">Team Wellbeing and Engagement</text:h>
      <text:p text:style-name="P2">Customer service can be demanding, especially during busy periods.</text:p>
      <text:p text:style-name="P2">Throughout my career, I've supported teams during high-pressure situations while helping maintain a positive atmosphere.</text:p>
      <text:p text:style-name="P2">I believe people perform at their best when they feel supported, valued and trusted, and creating that environment is something I genuinely care about.</text:p>
      <text:p text:style-name="P4"/>
      <text:p text:style-name="P5"/>
      <text:p text:style-name="P6">Valeria Kierbel</text:p>
      <text:p text:style-name="P7"><text:a xlink:type="simple" xlink:href="mailto:valereea@gmail.com" text:style-name="Internet_20_link" text:visited-style-name="Visited_20_Internet_20_Link">valereea@gmail.co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19:01:41.497938585</meta:creation-date>
    <dc:date>2026-06-21T19:15:46.083204499</dc:date>
    <meta:editing-duration>PT14M4S</meta:editing-duration>
    <meta:editing-cycles>2</meta:editing-cycles>
    <meta:generator>LibreOffice/25.8.7.3$Linux_X86_64 LibreOffice_project/580$Build-3</meta:generator>
    <meta:document-statistic meta:table-count="0" meta:image-count="0" meta:object-count="0" meta:page-count="2" meta:paragraph-count="28" meta:word-count="448" meta:character-count="2990" meta:non-whitespace-character-count="2550"/>
  </office:meta>
</office:document-meta>
</file>